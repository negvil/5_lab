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 fo:margin-right="-0.3118in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5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6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0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2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justify" fo:line-height="150%" fo:text-indent="4in"/>
    </style:style>
    <style:style style:name="T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2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4" style:parent-style-name="Standard" style:family="paragraph">
      <style:paragraph-properties fo:text-align="justify" fo:line-height="150%" fo:text-indent="0.4368in"/>
    </style:style>
    <style:style style:name="T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7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81" style:parent-style-name="Standard" style:family="paragraph">
      <style:paragraph-properties fo:text-align="justify" fo:line-height="150%" fo:text-indent="0.4368in"/>
    </style:style>
    <style:style style:name="T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8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7" style:parent-style-name="Standard" style:family="paragraph">
      <style:paragraph-properties fo:text-align="justify" fo:line-height="150%" fo:text-indent="0.4368in"/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0" style:parent-style-name="Standard" style:family="paragraph">
      <style:paragraph-properties fo:text-align="justify" fo:line-height="150%" fo:text-indent="0.4368in"/>
    </style:style>
    <style:style style:name="T1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5" style:parent-style-name="Standard" style:family="paragraph">
      <style:paragraph-properties fo:text-align="justify" fo:line-height="150%" fo:text-indent="0.4368in"/>
    </style:style>
    <style:style style:name="P106" style:parent-style-name="Standard" style:family="paragraph">
      <style:paragraph-properties fo:text-align="justify" fo:line-height="150%" fo:text-indent="0.4368in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6" style:parent-style-name="Standard" style:family="paragraph">
      <style:paragraph-properties fo:text-align="justify" fo:line-height="150%" fo:text-indent="0.4368in"/>
    </style:style>
    <style:style style:name="T14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4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15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151" style:parent-style-name="Standard" style:family="paragraph">
      <style:paragraph-properties fo:text-align="justify" fo:line-height="150%" fo:text-indent="0.4368in"/>
    </style:style>
    <style:style style:name="T1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61" style:parent-style-name="Standard" style:family="paragraph">
      <style:paragraph-properties fo:text-align="justify" fo:line-height="150%" fo:text-indent="0.4368in"/>
    </style:style>
    <style:style style:name="T1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1" style:parent-style-name="Standard" style:family="paragraph">
      <style:paragraph-properties fo:text-align="justify" fo:line-height="150%" fo:text-indent="0.4368in"/>
    </style:style>
    <style:style style:name="T1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86" style:parent-style-name="Standard" style:family="paragraph">
      <style:paragraph-properties fo:text-align="justify" fo:line-height="150%" fo:text-indent="0.4368in"/>
    </style:style>
    <style:style style:name="T1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94" style:parent-style-name="Standard" style:family="paragraph">
      <style:paragraph-properties fo:text-align="justify" fo:line-height="150%" fo:text-indent="0.4368in"/>
    </style:style>
    <style:style style:name="T1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9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9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5" style:parent-style-name="Standard" style:family="paragraph">
      <style:paragraph-properties fo:text-align="justify" fo:line-height="150%" fo:text-indent="0.4368in"/>
    </style:style>
    <style:style style:name="T2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219" style:parent-style-name="Standard" style:family="paragraph">
      <style:paragraph-properties fo:text-align="justify" fo:line-height="150%" fo:text-indent="0.4368in"/>
      <style:text-properties style:font-name="Courier New" style:font-name-complex="Courier New" fo:font-weight="bold" style:font-weight-asian="bold" fo:font-size="11pt" style:font-size-asian="11pt" style:font-size-complex="11pt" fo:language="ru" fo:country="RU"/>
    </style:style>
    <style:style style:name="P220" style:parent-style-name="Standard" style:family="paragraph">
      <style:paragraph-properties fo:text-align="justify" fo:line-height="150%" fo:text-indent="0.4368in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21" style:parent-style-name="Standard" style:family="paragraph">
      <style:paragraph-properties fo:text-align="justify" fo:line-height="150%" fo:text-indent="0.4368in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3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5" style:parent-style-name="Standard" style:family="paragraph">
      <style:paragraph-properties fo:text-align="justify" fo:line-height="150%" fo:text-indent="0.4368in"/>
    </style:style>
    <style:style style:name="T2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9" style:parent-style-name="Standard" style:family="paragraph">
      <style:paragraph-properties fo:text-align="justify" fo:line-height="150%" fo:text-indent="0.4368in"/>
    </style:style>
    <style:style style:name="T2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5" style:parent-style-name="Standard" style:family="paragraph">
      <style:paragraph-properties fo:text-align="justify" fo:line-height="150%" fo:text-indent="0.4368in"/>
    </style:style>
    <style:style style:name="T2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61" style:parent-style-name="Standard" style:family="paragraph">
      <style:paragraph-properties fo:text-align="justify" fo:line-height="150%" fo:text-indent="0.4368in"/>
    </style:style>
    <style:style style:name="T2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69" style:parent-style-name="Standard" style:family="paragraph">
      <style:paragraph-properties fo:text-align="justify" fo:line-height="150%" fo:text-indent="0.4368in"/>
    </style:style>
    <style:style style:name="T2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3" style:parent-style-name="Standard" style:family="paragraph">
      <style:paragraph-properties fo:text-align="justify" fo:line-height="150%" fo:text-indent="0.4368in"/>
    </style:style>
    <style:style style:name="T2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7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0" style:parent-style-name="Standard" style:family="paragraph">
      <style:paragraph-properties fo:text-align="justify" fo:line-height="150%" fo:text-indent="0.4368in"/>
    </style:style>
    <style:style style:name="T2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8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9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9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9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9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9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95" style:parent-style-name="Standard" style:family="paragraph">
      <style:paragraph-properties fo:text-align="justify" fo:line-height="150%" fo:text-indent="0.4368in"/>
    </style:style>
    <style:style style:name="T29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9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0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2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2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2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23" style:parent-style-name="Standard" style:family="paragraph">
      <style:paragraph-properties fo:text-align="justify" fo:line-height="150%" fo:text-indent="0.4368in"/>
    </style:style>
    <style:style style:name="T3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2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2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31" style:parent-style-name="Standard" style:family="paragraph">
      <style:paragraph-properties fo:text-align="justify" fo:line-height="150%" fo:text-indent="0.4368in"/>
    </style:style>
    <style:style style:name="T3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3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43" style:parent-style-name="Standard" style:family="paragraph">
      <style:paragraph-properties fo:text-align="justify" fo:line-height="150%" fo:text-indent="0.4368in"/>
    </style:style>
    <style:style style:name="T3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4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0" style:parent-style-name="Standard" style:family="paragraph">
      <style:paragraph-properties fo:text-align="justify" fo:line-height="150%" fo:text-indent="0.4368in"/>
    </style:style>
    <style:style style:name="T35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5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7" style:parent-style-name="Standard" style:family="paragraph">
      <style:paragraph-properties fo:text-align="justify" fo:line-height="150%" fo:text-indent="0.4368in"/>
    </style:style>
    <style:style style:name="T3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73" style:parent-style-name="Standard" style:family="paragraph">
      <style:paragraph-properties fo:text-align="justify" fo:line-height="150%" fo:text-indent="0.4368in"/>
    </style:style>
    <style:style style:name="T3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3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79" style:parent-style-name="Standard" style:family="paragraph">
      <style:paragraph-properties fo:text-align="justify" fo:line-height="150%" fo:text-indent="0.4368in"/>
    </style:style>
    <style:style style:name="T3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8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8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8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8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8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86" style:parent-style-name="Standard" style:family="paragraph">
      <style:paragraph-properties fo:text-align="justify" fo:line-height="150%" fo:text-indent="0.4368in"/>
    </style:style>
    <style:style style:name="T3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38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90" style:parent-style-name="Standard" style:family="paragraph">
      <style:paragraph-properties fo:text-align="justify" fo:line-height="150%" fo:text-indent="0.4368in"/>
    </style:style>
    <style:style style:name="T3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9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9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9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95" style:parent-style-name="Standard" style:family="paragraph">
      <style:paragraph-properties fo:text-align="justify" fo:line-height="150%" fo:text-indent="0.4368in"/>
    </style:style>
    <style:style style:name="T39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9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0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08" style:parent-style-name="Standard" style:family="paragraph">
      <style:paragraph-properties fo:text-align="justify" fo:line-height="150%" fo:text-indent="0.4368in"/>
    </style:style>
    <style:style style:name="T4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1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1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1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18" style:parent-style-name="Standard" style:family="paragraph">
      <style:paragraph-properties fo:text-align="justify" fo:line-height="150%" fo:text-indent="0.4368in"/>
    </style:style>
    <style:style style:name="T41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2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2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2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2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2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2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2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3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3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3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33" style:parent-style-name="Standard" style:family="paragraph">
      <style:paragraph-properties fo:text-align="justify" fo:line-height="150%" fo:text-indent="0.4368in"/>
    </style:style>
    <style:style style:name="T4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43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437" style:parent-style-name="Standard" style:family="paragraph">
      <style:paragraph-properties fo:text-align="justify" fo:line-height="150%" fo:text-indent="0.4368in"/>
    </style:style>
    <style:style style:name="T4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4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4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4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46" style:parent-style-name="Standard" style:family="paragraph">
      <style:paragraph-properties fo:text-align="justify" fo:line-height="150%" fo:text-indent="0.4368in"/>
    </style:style>
    <style:style style:name="T44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4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5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4" style:parent-style-name="Standard" style:family="paragraph">
      <style:paragraph-properties fo:text-align="justify" fo:line-height="150%" fo:text-indent="0.4368in"/>
    </style:style>
    <style:style style:name="T4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61" style:parent-style-name="Standard" style:family="paragraph">
      <style:paragraph-properties fo:text-align="justify" fo:line-height="150%" fo:text-indent="0.4368in"/>
    </style:style>
    <style:style style:name="T4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65" style:parent-style-name="Standard" style:family="paragraph">
      <style:paragraph-properties fo:text-align="justify" fo:line-height="150%" fo:text-indent="0.4368in"/>
    </style:style>
    <style:style style:name="T4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8" style:parent-style-name="Standard" style:family="paragraph">
      <style:paragraph-properties fo:text-align="justify" fo:line-height="150%" fo:text-indent="0.4368in"/>
    </style:style>
    <style:style style:name="T4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8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8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4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88" style:parent-style-name="Standard" style:family="paragraph">
      <style:paragraph-properties fo:text-align="justify" fo:line-height="150%" fo:text-indent="0.4368in"/>
    </style:style>
    <style:style style:name="T48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491" style:parent-style-name="Standard" style:family="paragraph">
      <style:paragraph-properties fo:line-height="150%"/>
      <style:text-properties fo:font-size="14pt" style:font-size-asian="14pt" fo:language="ru" fo:country="RU"/>
    </style:style>
    <style:style style:name="P492" style:parent-style-name="Standard" style:family="paragraph">
      <style:text-properties fo:font-weight="bold" style:font-weight-asian="bold" style:font-weight-complex="bold" fo:font-size="14pt" style:font-size-asian="14pt" fo:language="ru" fo:country="RU"/>
    </style:style>
    <style:style style:name="P493" style:parent-style-name="Standard" style:family="paragraph">
      <style:text-properties fo:language="ru" fo:country="RU"/>
    </style:style>
    <style:style style:name="P494" style:parent-style-name="Standard" style:family="paragraph">
      <style:paragraph-properties fo:text-align="center" fo:line-height="150%"/>
    </style:style>
    <style:style style:name="P495" style:parent-style-name="Standard" style:family="paragraph">
      <style:paragraph-properties fo:text-align="center" fo:line-height="150%" fo:text-indent="0.4368in"/>
    </style:style>
    <style:style style:name="T49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97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98" style:parent-style-name="Standard" style:family="paragraph">
      <style:paragraph-properties fo:text-align="center" fo:line-height="150%" fo:text-indent="0.4368in"/>
    </style:style>
    <style:style style:name="T49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00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501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502" style:parent-style-name="Standard" style:family="paragraph">
      <style:paragraph-properties fo:text-align="center" fo:line-height="150%" fo:text-indent="0.4368in"/>
    </style:style>
    <style:style style:name="T50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504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505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506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507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08" style:parent-style-name="Standard" style:family="paragraph">
      <style:paragraph-properties fo:text-align="justify" fo:line-height="150%" fo:text-indent="0.4368in"/>
    </style:style>
    <style:style style:name="T50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510" style:parent-style-name="Standard" style:family="paragraph">
      <style:paragraph-properties fo:text-align="justify" fo:line-height="150%"/>
      <style:text-properties fo:language="ru" fo:country="RU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<text:s/>Пензенский государственный университет</text:p>
      <text:p text:style-name="P3">Кафедра “Вычислительная техника”</text:p>
      <text:p text:style-name="P4"/>
      <text:p text:style-name="P5"/>
      <text:p text:style-name="P6"/>
      <text:p text:style-name="P7"/>
      <text:p text:style-name="P8"/>
      <text:p text:style-name="P9">Отчёт</text:p>
      <text:p text:style-name="P10">по лабораторной работе №5</text:p>
      <text:p text:style-name="P11">по курсу “Программирование на<text:s/>языке Java”</text:p>
      <text:p text:style-name="P12"><text:span text:style-name="T13">на тему “Многопоточность в Java ”</text:span></text:p>
      <text:p text:style-name="P14">Вариант 6</text:p>
      <text:p text:style-name="P15"/>
      <text:p text:style-name="P16"/>
      <text:p text:style-name="P17"/>
      <text:p text:style-name="P18"/>
      <text:p text:style-name="P19">Выполнили студенты гр. 23ВОЭ1:</text:p>
      <text:p text:style-name="P20">Григорян А.Л.</text:p>
      <text:p text:style-name="P21">Тюина Я.Ю.</text:p>
      <text:p text:style-name="P22"/>
      <text:p text:style-name="P23">Приняли:</text:p>
      <text:p text:style-name="P24"><text:span text:style-name="T25">к.т.н., доцент Юрова О.В.</text:span></text:p>
      <text:p text:style-name="P26">к.т.н., доцент Карамышева Н.С.</text:p>
      <text:p text:style-name="P27"/>
      <text:p text:style-name="P28"/>
      <text:p text:style-name="P29"/>
      <text:p text:style-name="P30"/>
      <text:p text:style-name="P31"/>
      <text:p text:style-name="P32"/>
      <text:p text:style-name="P33">Пенза 2026</text:p>
      <text:p text:style-name="P34"/>
      <text:soft-page-break/>
      <text:p text:style-name="P35">Цель работы</text:p>
      <text:p text:style-name="P36">Научиться создавать многопоточные<text:s/>приложения c использованием стандартных средств языка Java. <text:s/></text:p>
      <text:p text:style-name="P37">Лабораторное задание</text:p>
      <text:p text:style-name="P38">Модифицировать приложение из предыдущей лабораторной работы, реализовав вычисление определенного интеграла в нескольких дополнительных потоках (число потоков определяется номером варианта), снимая нагрузку с основного потока и предотвращая "подвисание" графического интерфейса. Варианты с номерами до 5 включительно реализуют многопоточность путем наследования от класса Thread, остальные реализуют интерфейс Runnable. Оформление<text:s/>лабораторной работы должно быть выполнено в соответствии с требованиями, приведенными в Приложении 2.</text:p>
      <text:p text:style-name="P39"><text:bookmark-start text:name="docs-internal-guid-1223526a-7fff-e36d-7d"/><text:bookmark-end text:name="docs-internal-guid-1223526a-7fff-e36d-7d"/>Ход выполнения работы</text:p>
      <text:p text:style-name="P40">Создали новый класс</text:p>
      <text:p text:style-name="P41">package my.contacteditor;</text:p>
      <text:p text:style-name="P42"/>
      <text:p text:style-name="P43">public class TrapezoidCalculator implements Runnable {</text:p>
      <text:p text:style-name="P44"><text:s text:c="4"/>private double start;<text:s/><text:s text:c="5"/></text:p>
      <text:p text:style-name="P45"><text:s text:c="4"/>private double end; <text:s text:c="5"/></text:p>
      <text:p text:style-name="P46"><text:s text:c="4"/>private double step; <text:s text:c="5"/></text:p>
      <text:p text:style-name="P47"><text:s text:c="4"/>private double partialResult;<text:s/></text:p>
      <text:p text:style-name="P48"><text:s text:c="4"/></text:p>
      <text:p text:style-name="P49"><text:s text:c="4"/>public TrapezoidCalculator(double start, double end, double step) {</text:p>
      <text:p text:style-name="P50"><text:s text:c="8"/>this.start = start;</text:p>
      <text:p text:style-name="P51"><text:s text:c="8"/>this.end = end;</text:p>
      <text:p text:style-name="P52"><text:s text:c="8"/>this.step = step;</text:p>
      <text:p text:style-name="P53"><text:s text:c="8"/>this.partialResult = 0.0;</text:p>
      <text:p text:style-name="P54"><text:s text:c="4"/>}</text:p>
      <text:p text:style-name="P55"><text:s text:c="4"/></text:p>
      <text:p text:style-name="P56"><text:s text:c="4"/>public double getPartialResult() {</text:p>
      <text:p text:style-name="P57"><text:s text:c="8"/>return partialResult;</text:p>
      <text:p text:style-name="P58"><text:s text:c="4"/>}</text:p>
      <text:p text:style-name="P59"><text:s text:c="4"/></text:p>
      <text:p text:style-name="P60"><text:s text:c="4"/>@id86240433 (@Override)</text:p>
      <text:p text:style-name="P61"><text:s text:c="4"/>public void run() {</text:p>
      <text:p text:style-name="P62"><text:s text:c="8"/>double current = start;</text:p>
      <text:p text:style-name="P63"><text:s text:c="8"/>double sum = 0;</text:p>
      <text:soft-page-break/>
      <text:p text:style-name="P64"><text:s text:c="8"/></text:p>
      <text:p text:style-name="P65"><text:s text:c="8"/>while<text:s/>(current &lt; end) {</text:p>
      <text:p text:style-name="P66"><text:s text:c="12"/>double h = Math.min(step, end - current);</text:p>
      <text:p text:style-name="P67"><text:s text:c="12"/>sum += h * (Math.sqrt(current) + Math.sqrt(current + h)) / 2;</text:p>
      <text:p text:style-name="P68"><text:s text:c="12"/>current += h;</text:p>
      <text:p text:style-name="P69"><text:s text:c="8"/>}</text:p>
      <text:p text:style-name="P70"><text:s text:c="8"/></text:p>
      <text:p text:style-name="P71"><text:s text:c="8"/>partialResult = sum;</text:p>
      <text:p text:style-name="P72"><text:s text:c="2"/></text:p>
      <text:p text:style-name="P73"><text:s text:c="8"/>System.out.println("Поток " + Thread.currentThread().getName() +<text:s/></text:p>
      <text:p text:style-name="P74"><text:span text:style-name="T75"><text:s text:c="27"/></text:span><text:span text:style-name="T76">" вычислил интеграл на [" +<text:s/></text:span><text:span text:style-name="T77">start</text:span><text:span text:style-name="T78"><text:s/>+ "; " +<text:s/></text:span><text:span text:style-name="T79">end</text:span><text:span text:style-name="T80"><text:s/>+<text:s/></text:span></text:p>
      <text:p text:style-name="P81"><text:span text:style-name="T82"><text:s text:c="27"/></text:span><text:span text:style-name="T83">"] = " + partialResult);</text:span></text:p>
      <text:p text:style-name="P84"><text:s text:c="4"/>}</text:p>
      <text:p text:style-name="P85">}</text:p>
      <text:p text:style-name="P86"/>
      <text:p text:style-name="P87"><text:span text:style-name="T88">В</text:span><text:span text:style-name="T89"><text:s text:c="2"/>class ContactEditorUI<text:s/></text:span><text:span text:style-name="T90">изменили</text:span><text:span text:style-name="T91">:</text:span></text:p>
      <text:p text:style-name="P92"><text:s text:c="2"/>private static<text:s/>final int NUM_THREADS = 6;</text:p>
      <text:p text:style-name="P93"><text:s text:c="2"/>private ExecutorService threadPool;</text:p>
      <text:p text:style-name="P94"><text:s text:c="2"/></text:p>
      <text:p text:style-name="P95"><text:s text:c="4"/>public ContactEditorUI() {</text:p>
      <text:p text:style-name="P96"><text:s text:c="9"/>initComponents();</text:p>
      <text:p text:style-name="P97"><text:s text:c="4"/></text:p>
      <text:p text:style-name="P98"><text:s text:c="4"/>threadPool = Executors.newFixedThreadPool(NUM_THREADS); <text:s/></text:p>
      <text:p text:style-name="P99"/>
      <text:p text:style-name="P100"><text:span text:style-name="T101">Добавили</text:span><text:span text:style-name="T102">:</text:span></text:p>
      <text:p text:style-name="P103"><text:s/>import java.util.concurrent.ExecutorService;</text:p>
      <text:p text:style-name="P104">import<text:s/>java.util.concurrent.Executors;</text:p>
      <text:p text:style-name="P105"/>
      <text:p text:style-name="P106"><text:span text:style-name="T107">Изменили</text:span><text:span text:style-name="T108">:</text:span></text:p>
      <text:p text:style-name="P109">private void jButtonResultActionPerformed(java.awt.event.ActionEvent evt) { <text:s text:c="45"/></text:p>
      <text:p text:style-name="P110"/>
      <text:p text:style-name="P111"><text:s text:c="8"/>DefaultTableModel tModel = (DefaultTableModel) jTable1.getModel();</text:p>
      <text:p text:style-name="P112"><text:s text:c="8"/>int rowNum = jTable1.getSelectedRow();</text:p>
      <text:p text:style-name="P113"><text:s text:c="8"/></text:p>
      <text:p text:style-name="P114"><text:s text:c="8"/>if (rowNum == -1) {</text:p>
      <text:p text:style-name="P115"><text:s text:c="12"/>JOptionPane.showMessageDialog(null, "выберите строку");</text:p>
      <text:soft-page-break/>
      <text:p text:style-name="P116"><text:s text:c="12"/>return;</text:p>
      <text:p text:style-name="P117"><text:s text:c="8"/>}</text:p>
      <text:p text:style-name="P118"><text:s text:c="8"/></text:p>
      <text:p text:style-name="P119"><text:s text:c="8"/>try {</text:p>
      <text:p text:style-name="P120"><text:s text:c="12"/>double a =<text:s/>Double.parseDouble(tModel.getValueAt(rowNum, 0).toString());</text:p>
      <text:p text:style-name="P121"><text:s text:c="12"/>double b = Double.parseDouble(tModel.getValueAt(rowNum, 1).toString());</text:p>
      <text:p text:style-name="P122"><text:s text:c="12"/>double step = Double.parseDouble(tModel.getValueAt(rowNum, 2).toString());</text:p>
      <text:p text:style-name="P123"><text:s text:c="12"/></text:p>
      <text:p text:style-name="P124"><text:s text:c="11"/><text:s/>final int currentRow = rowNum;</text:p>
      <text:p text:style-name="P125"><text:s text:c="12"/>final double finalA = a;</text:p>
      <text:p text:style-name="P126"><text:s text:c="12"/>final double finalB = b;</text:p>
      <text:p text:style-name="P127"><text:s text:c="12"/>final double finalStep = step;</text:p>
      <text:p text:style-name="P128"/>
      <text:p text:style-name="P129"><text:s text:c="12"/>threadPool.submit(() -&gt; {</text:p>
      <text:p text:style-name="P130"><text:s text:c="16"/>try {</text:p>
      <text:p text:style-name="P131"><text:s text:c="20"/>double intervalWidth =<text:s/>(finalB - finalA) / NUM_THREADS;</text:p>
      <text:p text:style-name="P132"><text:s text:c="20"/>List&lt;TrapezoidCalculator&gt; calculators = new ArrayList&lt;&gt;();</text:p>
      <text:p text:style-name="P133"><text:s text:c="20"/>List&lt;Thread&gt; threads = new ArrayList&lt;&gt;();</text:p>
      <text:p text:style-name="P134"><text:s text:c="20"/></text:p>
      <text:p text:style-name="P135"><text:s text:c="20"/>// Создаём и запускаем 6 потоков<text:s/></text:p>
      <text:p text:style-name="P136"><text:s text:c="7"/><text:s text:c="13"/>for (int i = 0; i &lt; NUM_THREADS; i++) {</text:p>
      <text:p text:style-name="P137"><text:s text:c="24"/>double start = finalA + i * intervalWidth;</text:p>
      <text:p text:style-name="P138"><text:s text:c="24"/>double end = (i == NUM_THREADS - 1) ? finalB : start + intervalWidth;</text:p>
      <text:p text:style-name="P139"><text:s text:c="24"/></text:p>
      <text:p text:style-name="P140"><text:s text:c="17"/><text:s text:c="7"/>TrapezoidCalculator calculator = new TrapezoidCalculator(start, end, finalStep);</text:p>
      <text:p text:style-name="P141"><text:s text:c="24"/>calculators.add(calculator);</text:p>
      <text:p text:style-name="P142"><text:s text:c="24"/></text:p>
      <text:p text:style-name="P143"><text:s text:c="24"/>Thread thread = new Thread(calculator);</text:p>
      <text:p text:style-name="P144"><text:s text:c="24"/>threads.add(thread);</text:p>
      <text:p text:style-name="P145"><text:s text:c="24"/>thread.start();</text:p>
      <text:p text:style-name="P146"><text:span text:style-name="T147"><text:s text:c="20"/></text:span><text:span text:style-name="T148">}</text:span></text:p>
      <text:p text:style-name="P149"><text:s text:c="20"/></text:p>
      <text:p text:style-name="P150"><text:s text:c="20"/>// Ожидание завершения всех потоков</text:p>
      <text:p text:style-name="P151"><text:span text:style-name="T152"><text:s text:c="20"/></text:span><text:span text:style-name="T153">for</text:span><text:span text:style-name="T154"><text:s/>(</text:span><text:span text:style-name="T155">Thread</text:span><text:span text:style-name="T156"><text:s/></text:span><text:span text:style-name="T157">thread</text:span><text:span text:style-name="T158"><text:s/>:<text:s/></text:span><text:span text:style-name="T159">threads</text:span><text:span text:style-name="T160">) {</text:span></text:p>
      <text:soft-page-break/>
      <text:p text:style-name="P161"><text:span text:style-name="T162"><text:s text:c="24"/></text:span><text:span text:style-name="T163">thread.join();</text:span></text:p>
      <text:p text:style-name="P164"><text:s text:c="20"/>}</text:p>
      <text:p text:style-name="P165"><text:s text:c="20"/></text:p>
      <text:p text:style-name="P166"><text:s text:c="20"/>double totalResult = 0;</text:p>
      <text:p text:style-name="P167"><text:s text:c="20"/>for (TrapezoidCalculator calculator : calculators) {</text:p>
      <text:p text:style-name="P168"><text:s text:c="24"/>totalResult += calculator.getPartialResult();</text:p>
      <text:p text:style-name="P169"><text:s text:c="20"/>}</text:p>
      <text:p text:style-name="P170"><text:s text:c="4"/><text:s text:c="16"/></text:p>
      <text:p text:style-name="P171"><text:s text:c="20"/>final double result = totalResult;</text:p>
      <text:p text:style-name="P172"><text:s text:c="20"/></text:p>
      <text:p text:style-name="P173"><text:s text:c="20"/>javax.swing.SwingUtilities.invokeLater(() -&gt; {</text:p>
      <text:p text:style-name="P174"><text:s text:c="24"/>try {</text:p>
      <text:p text:style-name="P175"><text:s text:c="28"/>RecIntegral rec = new<text:s/>RecIntegral(finalA, finalB, finalStep);</text:p>
      <text:p text:style-name="P176"><text:s text:c="28"/>rec.setResult(result);</text:p>
      <text:p text:style-name="P177"><text:s text:c="28"/>arrInteg.set(currentRow, rec);</text:p>
      <text:p text:style-name="P178"><text:s text:c="28"/>tModel.setValueAt(result, currentRow, 3);</text:p>
      <text:p text:style-name="P179"><text:s text:c="28"/></text:p>
      <text:p text:style-name="P180"><text:s text:c="7"/><text:s text:c="21"/>JOptionPane.showMessageDialog(this,<text:s/></text:p>
      <text:p text:style-name="P181"><text:span text:style-name="T182"><text:s text:c="32"/></text:span><text:span text:style-name="T183">"Вычисление завершено!\</text:span><text:span text:style-name="T184">n</text:span><text:span text:style-name="T185">" +</text:span></text:p>
      <text:p text:style-name="P186"><text:span text:style-name="T187"><text:s text:c="32"/>"Количество потоков: " +<text:s/></text:span><text:span text:style-name="T188">NUM</text:span><text:span text:style-name="T189">_</text:span><text:span text:style-name="T190">THREADS</text:span><text:span text:style-name="T191"><text:s/>+ "\</text:span><text:span text:style-name="T192">n</text:span><text:span text:style-name="T193">" +</text:span></text:p>
      <text:p text:style-name="P194"><text:span text:style-name="T195"><text:s text:c="32"/></text:span><text:span text:style-name="T196">"Результат: " + String.forma</text:span><text:span text:style-name="T197">t("%.6f", result),</text:span></text:p>
      <text:p text:style-name="P198"><text:s text:c="32"/>"Многопоточное вычисление", JOptionPane.INFORMATION_MESSAGE);</text:p>
      <text:p text:style-name="P199"><text:s text:c="24"/>} catch (InvalidRangeException ex) {</text:p>
      <text:p text:style-name="P200"><text:s text:c="28"/>tModel.setValueAt("Ошибка", currentRow, 3);</text:p>
      <text:p text:style-name="P201"><text:s text:c="28"/>JOptionPane.showMessageDialog(this, ex.getMessage(), "Ошибка", JOptionPane.ERROR_MESSAGE);</text:p>
      <text:p text:style-name="P202"><text:s text:c="24"/>}</text:p>
      <text:p text:style-name="P203"><text:s text:c="20"/>});</text:p>
      <text:p text:style-name="P204"><text:s text:c="20"/></text:p>
      <text:p text:style-name="P205"><text:s text:c="16"/>} catch (Exception ex) {</text:p>
      <text:p text:style-name="P206"><text:s text:c="20"/>ex.printStackTrace();</text:p>
      <text:p text:style-name="P207"><text:s text:c="16"/>}</text:p>
      <text:p text:style-name="P208"><text:s text:c="12"/>});</text:p>
      <text:p text:style-name="P209"><text:s text:c="12"/></text:p>
      <text:p text:style-name="P210"><text:s text:c="8"/>} catch (NumberFormatException ex) {</text:p>
      <text:p text:style-name="P211"><text:s text:c="12"/>JOptionPane.showMessageDialog(this, "Ошибка в данных: " + ex.getMessage(), "Ошибка", JOptionPane.ERROR_MESSAGE);</text:p>
      <text:soft-page-break/>
      <text:p text:style-name="P212"><text:s text:c="8"/>}</text:p>
      <text:p text:style-name="P213"><text:s text:c="3"/></text:p>
      <text:p text:style-name="P214"><text:s text:c="4"/>}</text:p>
      <text:p text:style-name="P215"><text:span text:style-name="T216"><text:s text:c="2"/></text:span><text:span text:style-name="T217"><text:s/></text:span><text:span text:style-name="T218"><text:s text:c="3"/></text:span></text:p>
      <text:p text:style-name="P219"/>
      <text:p text:style-name="P220">Дополнительное задание</text:p>
      <text:p text:style-name="P221"><text:span text:style-name="T222">Вывод времени каждого потоков.</text:span><text:span text:style-name="T223"><text:s/></text:span><text:span text:style-name="T224">Д</text:span><text:span text:style-name="T225">ля этого изменили метод run в public class TrapezoidCalculato</text:span></text:p>
      <text:p text:style-name="P226">public void run() {</text:p>
      <text:p text:style-name="P227"><text:s text:c="8"/>long startTime = System.currentTimeMillis();</text:p>
      <text:p text:style-name="P228"><text:s text:c="8"/>LocalTime startLocalTime = LocalTime.now();</text:p>
      <text:p text:style-name="P229"><text:s text:c="8"/></text:p>
      <text:p text:style-name="P230"><text:s text:c="8"/>double current = start;</text:p>
      <text:p text:style-name="P231"><text:s text:c="8"/>double sum = 0;</text:p>
      <text:p text:style-name="P232"><text:s text:c="8"/></text:p>
      <text:p text:style-name="P233"><text:s text:c="8"/>while (current &lt; end) {</text:p>
      <text:p text:style-name="P234"><text:s text:c="12"/>double h = Math.min(step, end - current);</text:p>
      <text:p text:style-name="P235"><text:s text:c="12"/>sum += h * (Math.sqrt(current) + Math.sqrt(current + h)) / 2;</text:p>
      <text:p text:style-name="P236"><text:s text:c="12"/>current += h;</text:p>
      <text:p text:style-name="P237"><text:s text:c="8"/>}</text:p>
      <text:p text:style-name="P238"><text:s text:c="8"/></text:p>
      <text:p text:style-name="P239"><text:s text:c="8"/>partialResult = sum;</text:p>
      <text:p text:style-name="P240"><text:s text:c="8"/>executionTime = System.currentTimeMillis() - startTime;</text:p>
      <text:p text:style-name="P241"><text:s text:c="8"/>LocalTime endLocalTime = LocalTime.now();</text:p>
      <text:p text:style-name="P242"><text:s text:c="8"/></text:p>
      <text:p text:style-name="P243"><text:s text:c="8"/>DateTimeFormatter formatter = DateTimeFormatter.ofPattern("HH:mm:ss.SSS");</text:p>
      <text:p text:style-name="P244"><text:s text:c="8"/></text:p>
      <text:p text:style-name="P245"><text:span text:style-name="T246"><text:s text:c="8"/>System.out.println("</text:span><text:span text:style-name="T247">Поток</text:span><text:span text:style-name="T248"><text:s/>" + Thread.currentThread().getName());</text:span></text:p>
      <text:p text:style-name="P249"><text:span text:style-name="T250"><text:s text:c="8"/>System.out.println("</text:span><text:span text:style-name="T251">Время</text:span><text:span text:style-name="T252"><text:s/></text:span><text:span text:style-name="T253">начала</text:span><text:span text:style-name="T254">: " + startLocalTime.format(formatter));</text:span></text:p>
      <text:p text:style-name="P255"><text:span text:style-name="T256"><text:s text:c="8"/>System.out.println("</text:span><text:span text:style-name="T257">Время</text:span><text:span text:style-name="T258"><text:s/></text:span><text:span text:style-name="T259">окончания</text:span><text:span text:style-name="T260">: " + endLocalTime.format(formatter));</text:span></text:p>
      <text:p text:style-name="P261"><text:span text:style-name="T262"><text:s text:c="8"/>System.out.println("</text:span><text:span text:style-name="T263">Время</text:span><text:span text:style-name="T264"><text:s/></text:span><text:span text:style-name="T265">выполнения</text:span><text:span text:style-name="T266">: " + executionTime + "<text:s/></text:span><text:span text:style-name="T267">мс</text:span><text:span text:style-name="T268">");</text:span></text:p>
      <text:p text:style-name="P269"><text:span text:style-name="T270"><text:s text:c="8"/>System.out.println("</text:span><text:span text:style-name="T271">Интервал</text:span><text:span text:style-name="T272">: [" + start + "; " + end + "]");</text:span></text:p>
      <text:p text:style-name="P273"><text:span text:style-name="T274"><text:s text:c="8"/>System.out.println("</text:span><text:span text:style-name="T275">Результат</text:span><text:span text:style-name="T276">: " + partialResult);</text:span></text:p>
      <text:p text:style-name="P277"><text:s text:c="4"/>}</text:p>
      <text:p text:style-name="P278"/>
      <text:p text:style-name="P279"/>
      <text:soft-page-break/>
      <text:p text:style-name="P280"><text:span text:style-name="T281">изменили</text:span><text:span text:style-name="T282"><text:s/></text:span><text:span text:style-name="T283">метод</text:span><text:span text:style-name="T284"><text:s/>jButtonResultActionPerformed<text:s/></text:span><text:span text:style-name="T285">в</text:span><text:span text:style-name="T286"><text:s/>public class ContactEditorUI</text:span></text:p>
      <text:p text:style-name="P287"/>
      <text:p text:style-name="P288"/>
      <text:p text:style-name="P289">private void jButtonResultActionPerformed(java.awt.event.ActionEvent evt) { <text:s text:c="45"/></text:p>
      <text:p text:style-name="P290"><text:s text:c="41"/></text:p>
      <text:p text:style-name="P291"><text:s text:c="4"/>DefaultTableModel tModel = (DefaultTableModel) jTable1.getModel();</text:p>
      <text:p text:style-name="P292"><text:s text:c="4"/>int rowNum = jTable1.getSelectedRow();</text:p>
      <text:p text:style-name="P293"><text:s text:c="4"/></text:p>
      <text:p text:style-name="P294"><text:s text:c="4"/>if (rowNum == -1) {</text:p>
      <text:p text:style-name="P295"><text:span text:style-name="T296"><text:s text:c="8"/>JOptionPane.showMessageDialog(null, "</text:span><text:span text:style-name="T297">выберите</text:span><text:span text:style-name="T298"><text:s/></text:span><text:span text:style-name="T299">строку</text:span><text:span text:style-name="T300">");</text:span></text:p>
      <text:p text:style-name="P301"><text:s text:c="8"/>return;</text:p>
      <text:p text:style-name="P302"><text:s text:c="4"/>}</text:p>
      <text:p text:style-name="P303"><text:s text:c="4"/></text:p>
      <text:p text:style-name="P304"><text:s text:c="4"/>try {</text:p>
      <text:p text:style-name="P305"><text:s text:c="8"/>double a = Double.parseDouble(tModel.getValueAt(rowNum, 0).toString());</text:p>
      <text:p text:style-name="P306"><text:s text:c="8"/>double b = Double.parseDouble(tModel.getValueAt(rowNum, 1).toString());</text:p>
      <text:p text:style-name="P307"><text:s text:c="8"/>double step = Double.parseDouble(tModel.getValueAt(rowNum, 2).toString());</text:p>
      <text:p text:style-name="P308"><text:s text:c="8"/></text:p>
      <text:p text:style-name="P309"><text:s text:c="8"/>final int currentRow = rowNum;</text:p>
      <text:p text:style-name="P310"><text:s text:c="8"/>final double finalA = a;</text:p>
      <text:p text:style-name="P311"><text:s text:c="8"/>final double finalB = b;</text:p>
      <text:p text:style-name="P312"><text:s text:c="8"/>final double finalStep = step;</text:p>
      <text:p text:style-name="P313"><text:s text:c="8"/></text:p>
      <text:p text:style-name="P314"><text:s text:c="8"/>final long overallStartTime = System.currentTimeMillis();</text:p>
      <text:p text:style-name="P315"><text:s text:c="8"/>final LocalTime overallStartLocal = LocalTime.now();</text:p>
      <text:p text:style-name="P316"/>
      <text:p text:style-name="P317"><text:s text:c="8"/>threadPool.submit(() -&gt; {</text:p>
      <text:p text:style-name="P318"><text:s text:c="12"/>try {</text:p>
      <text:p text:style-name="P319"><text:s text:c="16"/>double intervalWidth = (finalB - finalA) / NUM_THREADS;</text:p>
      <text:p text:style-name="P320"><text:s text:c="16"/>List&lt;TrapezoidCalculator&gt; calculators = new ArrayList&lt;&gt;();</text:p>
      <text:p text:style-name="P321"><text:s text:c="16"/>List&lt;Thread&gt; threads = new ArrayList&lt;&gt;();</text:p>
      <text:p text:style-name="P322"><text:s text:c="16"/></text:p>
      <text:p text:style-name="P323"><text:span text:style-name="T324"><text:s text:c="16"/>System.out.println("</text:span><text:span text:style-name="T325">Общее</text:span><text:span text:style-name="T326"><text:s/></text:span><text:span text:style-name="T327">время</text:span><text:span text:style-name="T328"><text:s/></text:span><text:span text:style-name="T329">начала</text:span><text:span text:style-name="T330">: " + overallStartLocal.format(DateTimeFormatter.ofPattern("HH:mm:ss.SSS")));</text:span></text:p>
      <text:soft-page-break/>
      <text:p text:style-name="P331"><text:span text:style-name="T332"><text:s text:c="16"/>System.out.println("</text:span><text:span text:style-name="T333">Интеграл</text:span><text:span text:style-name="T334"><text:s/></text:span><text:span text:style-name="T335">от</text:span><text:span text:style-name="T336"><text:s/>" + finalA + "<text:s/></text:span><text:span text:style-name="T337">до</text:span><text:span text:style-name="T338"><text:s/>" + finalB + "<text:s/></text:span><text:span text:style-name="T339">с</text:span><text:span text:style-name="T340"><text:s/></text:span><text:span text:style-name="T341">шагом</text:span><text:span text:style-name="T342"><text:s/>" + finalStep);</text:span></text:p>
      <text:p text:style-name="P343"><text:span text:style-name="T344"><text:s text:c="16"/>System.out.println("</text:span><text:span text:style-name="T345">Количество</text:span><text:span text:style-name="T346"><text:s/></text:span><text:span text:style-name="T347">потоков</text:span><text:span text:style-name="T348">: " + NUM_THREADS + "\n");</text:span></text:p>
      <text:p text:style-name="P349"><text:s text:c="16"/></text:p>
      <text:p text:style-name="P350"><text:span text:style-name="T351"><text:s text:c="16"/>//<text:s/></text:span><text:span text:style-name="T352">Создаём</text:span><text:span text:style-name="T353"><text:s/></text:span><text:span text:style-name="T354">и</text:span><text:span text:style-name="T355"><text:s/></text:span><text:span text:style-name="T356">запускаем</text:span><text:span text:style-name="T357"><text:s/>6<text:s/></text:span><text:span text:style-name="T358">потоков</text:span><text:span text:style-name="T359"><text:s/></text:span></text:p>
      <text:p text:style-name="P360"><text:s text:c="16"/>for (int i = 0; i &lt; NUM_THREADS; i++) {</text:p>
      <text:p text:style-name="P361"><text:s text:c="20"/>double start = finalA + i * intervalWidth;</text:p>
      <text:p text:style-name="P362"><text:s text:c="20"/>double end = (i == NUM_THREADS - 1) ? finalB : start + intervalWidth;</text:p>
      <text:p text:style-name="P363"><text:s text:c="20"/></text:p>
      <text:p text:style-name="P364"><text:s text:c="20"/>TrapezoidCalculator calculator = new TrapezoidCalculator(start, end, finalStep);</text:p>
      <text:p text:style-name="P365"><text:s text:c="20"/>calculators.add(calculator);</text:p>
      <text:p text:style-name="P366"><text:s text:c="20"/></text:p>
      <text:p text:style-name="P367"><text:span text:style-name="T368"><text:s text:c="20"/>Thread thread = new Thread(calculator, "</text:span><text:span text:style-name="T369">Поток</text:span><text:span text:style-name="T370">-" + (i+1));</text:span></text:p>
      <text:p text:style-name="P371"><text:s text:c="20"/>threads.add(thread);</text:p>
      <text:p text:style-name="P372"><text:s text:c="20"/>thread.start();</text:p>
      <text:p text:style-name="P373"><text:span text:style-name="T374"><text:s text:c="16"/></text:span><text:span text:style-name="T375">}</text:span></text:p>
      <text:p text:style-name="P376"><text:s text:c="16"/></text:p>
      <text:p text:style-name="P377"><text:s text:c="16"/>// Ожидание завершения всех потоков</text:p>
      <text:p text:style-name="P378"><text:s text:c="16"/>for (Thread thread : threads) {</text:p>
      <text:p text:style-name="P379"><text:span text:style-name="T380"><text:s text:c="20"/></text:span><text:span text:style-name="T381">thread.join();</text:span></text:p>
      <text:p text:style-name="P382"><text:s text:c="16"/>}</text:p>
      <text:p text:style-name="P383"><text:s text:c="16"/></text:p>
      <text:p text:style-name="P384"><text:s text:c="16"/>double totalResult = 0;</text:p>
      <text:p text:style-name="P385"><text:s text:c="16"/>StringBuilder timesInfo = new StringBuilder();</text:p>
      <text:p text:style-name="P386"><text:span text:style-name="T387"><text:s text:c="16"/></text:span><text:span text:style-name="T388">timesInfo.append("\nВРЕМЯ ВЫПОЛНЕНИЯ ПОТОКОВ\n");</text:span></text:p>
      <text:p text:style-name="P389"><text:s text:c="16"/></text:p>
      <text:p text:style-name="P390"><text:span text:style-name="T391"><text:s text:c="16"/></text:span><text:span text:style-name="T392">for (int i = 0; i &lt; calculators.size(); i++) {</text:span></text:p>
      <text:p text:style-name="P393"><text:s text:c="20"/>TrapezoidCalculator calc = calculators.get(i);</text:p>
      <text:p text:style-name="P394"><text:s text:c="20"/>totalResult += calc.getPartialResult();</text:p>
      <text:p text:style-name="P395"><text:span text:style-name="T396"><text:s text:c="20"/>timesInfo.append("</text:span><text:span text:style-name="T397">Поток</text:span><text:span text:style-name="T398">-" + (i+1) + ": " + calc.getExecutionTime() + "<text:s/></text:span><text:span text:style-name="T399">мс</text:span><text:span text:style-name="T400">\n");</text:span></text:p>
      <text:p text:style-name="P401"><text:s text:c="16"/>}</text:p>
      <text:p text:style-name="P402"><text:s text:c="16"/></text:p>
      <text:p text:style-name="P403"><text:s text:c="16"/>final double result = totalResult;</text:p>
      <text:p text:style-name="P404"><text:s text:c="16"/>final long overallEndTime = System.currentTimeMillis();</text:p>
      <text:p text:style-name="P405"><text:s text:c="16"/>final long totalExecutionTime = overallEndTime - overallStartTime;</text:p>
      <text:soft-page-break/>
      <text:p text:style-name="P406"><text:s text:c="16"/></text:p>
      <text:p text:style-name="P407"><text:s text:c="16"/>System.out.println(timesInfo.toString());</text:p>
      <text:p text:style-name="P408"><text:span text:style-name="T409"><text:s text:c="16"/>System.out.println("</text:span><text:span text:style-name="T410">Общее</text:span><text:span text:style-name="T411"><text:s/></text:span><text:span text:style-name="T412">время</text:span><text:span text:style-name="T413"><text:s/></text:span><text:span text:style-name="T414">выполнения</text:span><text:span text:style-name="T415">: " + totalExecutionTime + "<text:s/></text:span><text:span text:style-name="T416">мс</text:span><text:span text:style-name="T417">");</text:span></text:p>
      <text:p text:style-name="P418"><text:span text:style-name="T419"><text:s text:c="16"/>System.out.println("</text:span><text:span text:style-name="T420">Суммарный</text:span><text:span text:style-name="T421"><text:s/></text:span><text:span text:style-name="T422">результат</text:span><text:span text:style-name="T423">: " + result);</text:span></text:p>
      <text:p text:style-name="P424"><text:s text:c="16"/></text:p>
      <text:p text:style-name="P425"><text:s text:c="16"/>javax.swing.SwingUtilities.invokeLater(() -&gt; {</text:p>
      <text:p text:style-name="P426"><text:s text:c="20"/>try {</text:p>
      <text:p text:style-name="P427"><text:s text:c="24"/>RecIntegral rec = new RecIntegral(finalA, finalB, finalStep);</text:p>
      <text:p text:style-name="P428"><text:s text:c="24"/>rec.setResult(result);</text:p>
      <text:p text:style-name="P429"><text:s text:c="24"/>arrInteg.set(currentRow, rec);</text:p>
      <text:p text:style-name="P430"><text:s text:c="24"/>tModel.setValueAt(result, currentRow, 3);</text:p>
      <text:p text:style-name="P431"><text:s text:c="24"/></text:p>
      <text:p text:style-name="P432"><text:s text:c="24"/>JOptionPane.showMessageDialog(this,<text:s/></text:p>
      <text:p text:style-name="P433"><text:span text:style-name="T434"><text:s text:c="28"/></text:span><text:span text:style-name="T435">"Вычисление завершено!\n" +</text:span></text:p>
      <text:p text:style-name="P436"><text:s text:c="28"/>"Количество потоков: " + NUM_THREADS + "\n" +</text:p>
      <text:p text:style-name="P437"><text:span text:style-name="T438"><text:s text:c="28"/></text:span><text:span text:style-name="T439">"</text:span><text:span text:style-name="T440">Общее</text:span><text:span text:style-name="T441"><text:s/></text:span><text:span text:style-name="T442">время</text:span><text:span text:style-name="T443">: " + totalExecutionTime + "<text:s/></text:span><text:span text:style-name="T444">мс</text:span><text:span text:style-name="T445">\n" +</text:span></text:p>
      <text:p text:style-name="P446"><text:span text:style-name="T447"><text:s text:c="28"/>"</text:span><text:span text:style-name="T448">Результат</text:span><text:span text:style-name="T449">: " +</text:span></text:p>
      <text:p text:style-name="P450"/>
      <text:p text:style-name="P451"/>
      <text:p text:style-name="P452">String.format("%.6f", result) + "\n\n" +</text:p>
      <text:p text:style-name="P453"><text:s text:c="28"/>timesInfo.toString(),</text:p>
      <text:p text:style-name="P454"><text:span text:style-name="T455"><text:s text:c="28"/>"</text:span><text:span text:style-name="T456">Многопоточное</text:span><text:span text:style-name="T457"><text:s/></text:span><text:span text:style-name="T458">вычисление</text:span><text:span text:style-name="T459">", JOptionPane.INFORMATION_MESSAGE);</text:span></text:p>
      <text:p text:style-name="P460"><text:s text:c="20"/>} catch (InvalidRangeException ex) {</text:p>
      <text:p text:style-name="P461"><text:span text:style-name="T462"><text:s text:c="24"/>tModel.setValueAt("</text:span><text:span text:style-name="T463">Ошибка</text:span><text:span text:style-name="T464">", currentRow, 3);</text:span></text:p>
      <text:p text:style-name="P465"><text:span text:style-name="T466"><text:s text:c="24"/>JOptionPane.showMessageDialog(this, ex.getMessage(), "</text:span><text:span text:style-name="T467">Ошибка</text:span><text:span text:style-name="T468">", JOptionPane.ERROR_MESSAGE);</text:span></text:p>
      <text:p text:style-name="P469"><text:s text:c="20"/>}</text:p>
      <text:p text:style-name="P470"><text:s text:c="16"/>});</text:p>
      <text:p text:style-name="P471"><text:s text:c="16"/></text:p>
      <text:p text:style-name="P472"><text:s text:c="12"/>} catch (Exception ex) {</text:p>
      <text:p text:style-name="P473"><text:s text:c="16"/>ex.printStackTrace();</text:p>
      <text:p text:style-name="P474"><text:s text:c="12"/>}</text:p>
      <text:p text:style-name="P475"><text:s text:c="8"/>});</text:p>
      <text:p text:style-name="P476"><text:s text:c="8"/></text:p>
      <text:p text:style-name="P477"><text:s text:c="4"/>} catch (NumberFormatException ex) {</text:p>
      <text:soft-page-break/>
      <text:p text:style-name="P478"><text:span text:style-name="T479"><text:s text:c="8"/>JOptionPane.showMessageDialog(this, "</text:span><text:span text:style-name="T480">Ошибка</text:span><text:span text:style-name="T481"><text:s/></text:span><text:span text:style-name="T482">в</text:span><text:span text:style-name="T483"><text:s/></text:span><text:span text:style-name="T484">данных</text:span><text:span text:style-name="T485">: " + ex.getMessage(), "</text:span><text:span text:style-name="T486">Ошибка</text:span><text:span text:style-name="T487">", JOptionPane.ERROR_MESSAGE);</text:span></text:p>
      <text:p text:style-name="P488"><text:span text:style-name="T489"><text:s text:c="4"/></text:span><text:span text:style-name="T490">}</text:span></text:p>
      <text:p text:style-name="P491"/>
      <text:p text:style-name="P492">Результат выполнения программы</text:p>
      <text:p text:style-name="P493"/>
      <text:p text:style-name="P494"/>
      <text:p text:style-name="P495"><text:span text:style-name="T496"><draw:frame draw:style-name="a0" draw:name="Рисунок 14" text:anchor-type="as-char" svg:x="0in" svg:y="0in" svg:width="5.42249in" svg:height="4.25995in" style:rel-width="scale" style:rel-height="scale"><draw:image xlink:href="media/image1.jpg" xlink:type="simple" xlink:show="embed" xlink:actuate="onLoad"/><svg:title/><svg:desc/></draw:frame></text:span></text:p>
      <text:p text:style-name="P497">Рисунок 1<text:s/>—<text:s/>Результат вычисления многопоточности</text:p>
      <text:p text:style-name="P498"><text:span text:style-name="T499"><draw:frame draw:style-name="a1" draw:name="Рисунок 15" text:anchor-type="as-char" svg:x="0in" svg:y="0in" svg:width="6.2846in" svg:height="1.4846in" style:rel-width="scale" style:rel-height="scale"><draw:image xlink:href="media/image2.jpg" xlink:type="simple" xlink:show="embed" xlink:actuate="onLoad"/><svg:title/><svg:desc/></draw:frame></text:span></text:p>
      <text:p text:style-name="P500">Рисунок 2<text:s/>—<text:s/>Результат 6 потоков</text:p>
      <text:p text:style-name="P501"/>
      <text:soft-page-break/>
      <text:p text:style-name="P502"><text:span text:style-name="T503"><draw:frame draw:style-name="a2" draw:name="Рисунок 4" text:anchor-type="as-char" svg:x="0in" svg:y="0in" svg:width="5.79988in" svg:height="4.54089in" style:rel-width="scale" style:rel-height="scale"><draw:image xlink:href="media/image3.jpg" xlink:type="simple" xlink:show="embed" xlink:actuate="onLoad"/><svg:title/><svg:desc/></draw:frame></text:span></text:p>
      <text:p text:style-name="P504">Рисунок 3<text:s/>– Вывод времени выполнения потоков</text:p>
      <text:p text:style-name="P505"/>
      <text:p text:style-name="P506"/>
      <text:p text:style-name="P507">Вывод</text:p>
      <text:p text:style-name="P508"><text:span text:style-name="T509">В ходе выполнения данной лабораторной работы были получены навыки <text:s/>создания многопоточных приложений c использованием стандартных средств языка Java. <text:s/></text:span></text:p>
      <text:p text:style-name="P5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писок1" style:display-name="список1" style:family="paragraph" style:parent-style-name="Standard" style:list-style-name="WW8Num7">
      <style:paragraph-properties style:snap-to-layout-grid="false" fo:text-align="justify" fo:line-height="150%"/>
      <style:text-properties fo:font-size="14pt" style:font-size-asian="14pt" fo:hyphenate="false"/>
    </style:style>
    <style:style style:name="Textbodyindent" style:display-name="Text body indent" style:family="paragraph" style:parent-style-name="Standard">
      <style:paragraph-properties fo:text-align="justify" fo:text-indent="0.2756in"/>
      <style:text-properties fo:font-size="14pt" style:font-size-asian="14pt" style:font-size-complex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7z0" style:display-name="WW8Num7z0" style:family="text">
      <style:text-properties fo:font-style="normal" style:font-style-asian="normal" fo:color="#000000"/>
    </style:style>
    <style:style style:name="WW8Num5z0" style:display-name="WW8Num5z0" style:family="text">
      <style:text-properties fo:font-weight="bold" style:font-weight-asian="bold" fo:color="#000000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Character_20_style" style:display-name="Character_20_style" style:family="text"/>
    <style:style style:name="WW_CharLFO1LVL1" style:family="text">
      <style:text-properties fo:font-style="normal" style:font-style-asian="normal" fo:color="#000000"/>
    </style:style>
    <text:list-style style:name="WW8Num7" style:display-name="WW8Num7">
      <text:list-level-style-number text:level="1" text:style-name="WW_CharLFO1LVL1" style:num-suffix="." style:num-format="1">
        <style:list-level-properties text:space-before="0.2in" text:min-label-width="0in" text:list-level-position-and-space-mode="label-alignment">
          <style:list-level-label-alignment text:label-followed-by="listtab" fo:margin-left="0.1in" fo:text-indent="0.1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color="#000000"/>
    </style:style>
    <text:list-style style:name="WW8Num5" style:display-name="WW8Num5">
      <text:list-level-style-number text:level="1" text:style-name="WW_CharLFO2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25in" fo:text-indent="0.1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bullet>
      <text:list-level-style-number text:level="2" style:num-format="1" text:display-levels="2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format="1" text:display-levels="3">
        <style:list-level-properties text:space-before="1.5256in" text:min-label-width="0.5in" text:list-level-position-and-space-mode="label-alignment">
          <style:list-level-label-alignment text:label-followed-by="listtab" fo:margin-left="2.0256in" fo:text-indent="-0.5in"/>
        </style:list-level-properties>
      </text:list-level-style-number>
      <text:list-level-style-bullet text:level="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bullet>
      <text:list-level-style-bullet text:level="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</text:list-level-style-bullet>
      <text:list-level-style-bullet text:level="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bullet>
      <text:list-level-style-bullet text:level="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bullet>
      <text:list-level-style-bullet text:level="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3333in" fo:margin-left="0.3333in" fo:margin-bottom="0.3333in" fo:margin-right="0.3333in" fo:border="0.0069in solid #000000" fo:padding-top="0.1395in" fo:padding-left="0.45in" fo:padding-bottom="0.1395in" fo:padding-right="0.14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ur</meta:initial-creator>
    <dc:creator>Артур</dc:creator>
    <meta:creation-date>2026-04-23T13:12:00Z</meta:creation-date>
    <dc:date>2026-05-07T14:22:00Z</dc:date>
    <meta:template xlink:href="Normal" xlink:type="simple"/>
    <meta:editing-cycles>3</meta:editing-cycles>
    <meta:editing-duration>PT780S</meta:editing-duration>
    <meta:document-statistic meta:page-count="11" meta:paragraph-count="25" meta:word-count="1881" meta:character-count="12584" meta:row-count="89" meta:non-whitespace-character-count="10728"/>
  </office:meta>
</office:document-meta>
</file>